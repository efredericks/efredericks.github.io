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bf00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44cm" fo:min-width="2.19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3.81cm" svg:x="9.733cm" svg:y="5.98cm">
          <text:p text:style-name="P1">/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81cm" svg:height="3.81cm" svg:x="6.715cm" svg:y="10.525cm">
          <text:p text:style-name="P1">Patr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3.81cm" svg:height="3.81cm" svg:x="4.492cm" svg:y="14.97cm">
          <text:p text:style-name="P3"><text:span text:style-name="T1">Rand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3.81cm" svg:height="3.81cm" svg:x="8.937cm" svg:y="14.97cm">
          <text:p text:style-name="P3"><text:span text:style-name="T1">Purs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81cm" svg:height="3.81cm" svg:x="12.747cm" svg:y="10.525cm">
          <text:p text:style-name="P1">At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10.291cm" svg:y1="9.232cm" svg:x2="8.62cm" svg:y2="10.525cm" draw:start-shape="id1" draw:start-glue-point="7" draw:end-shape="id2" svg:d="M10291 9232l-1671 1293" svg:viewBox="0 0 1672 1294">
          <text:p/>
        </draw:connector>
        <draw:connector draw:style-name="gr3" draw:text-style-name="P5" draw:layer="layout" draw:type="line" svg:x1="12.985cm" svg:y1="9.232cm" svg:x2="14.652cm" svg:y2="10.525cm" draw:start-shape="id1" draw:start-glue-point="9" draw:end-shape="id3" svg:d="M12985 9232l1667 1293" svg:viewBox="0 0 1668 1294">
          <text:p/>
        </draw:connector>
        <draw:connector draw:style-name="gr4" draw:text-style-name="P5" draw:layer="layout" draw:type="line" svg:x1="7.273cm" svg:y1="13.777cm" svg:x2="6.397cm" svg:y2="14.97cm" draw:start-shape="id2" draw:start-glue-point="7" draw:end-shape="id4" draw:end-glue-point="4" svg:d="M7273 13777l-876 1193" svg:viewBox="0 0 877 1194">
          <text:p/>
        </draw:connector>
        <draw:connector draw:style-name="gr5" draw:text-style-name="P5" draw:layer="layout" draw:type="line" svg:x1="9.967cm" svg:y1="13.777cm" svg:x2="10.842cm" svg:y2="14.97cm" draw:start-shape="id2" draw:start-glue-point="9" draw:end-shape="id5" draw:end-glue-point="4" svg:d="M9967 13777l875 1193" svg:viewBox="0 0 876 1194">
          <text:p/>
        </draw:connector>
        <draw:connector draw:style-name="gr6" draw:text-style-name="P5" draw:layer="layout" draw:type="line" svg:x1="15.999cm" svg:y1="13.777cm" svg:x2="16.785cm" svg:y2="15.517cm" draw:start-shape="id3" draw:start-glue-point="9" svg:d="M15999 13777l786 1740" svg:viewBox="0 0 787 1741">
          <text:p/>
        </draw:connector>
        <draw:frame draw:style-name="gr7" draw:text-style-name="P6" draw:layer="layout" svg:width="2.858cm" svg:height="1.27cm" svg:x="16.44cm" svg:y="15.30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9T09:43:30.619987068</meta:creation-date>
    <dc:date>2026-05-29T09:56:53.399928764</dc:date>
    <meta:editing-duration>PT6M55S</meta:editing-duration>
    <meta:editing-cycles>2</meta:editing-cycles>
    <meta:generator>LibreOffice/26.2.3.2$Linux_X86_64 LibreOffice_project/620$Build-2</meta:generator>
    <meta:document-statistic meta:object-count="11"/>
  </office:meta>
</office:document-meta>
</file>